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officeooo:rsid="001990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909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Qué evaluaré en cada momento y cómo pienso obtener datos y tratar las posibles variables que pudieran darse cuando implante la rúbrica y la diana de autoevaluación en mi aula con mi alumnado</text:span></text:p>
      <text:p text:style-name="Standard"/>
      <text:p text:style-name="Standard"/>
      <text:p text:style-name="Standard">La valoración se llevará a cabo e<text:span text:style-name="T1">n</text:span> <text:span text:style-name="T2">tres momentos</text:span>:</text:p>
      <text:p text:style-name="Standard"/>
      <text:list text:style-name="L1">
        <text:list-header>
          <text:p text:style-name="P1"><text:bookmark text:name="yui_3_18_1_1_1780322751266_197"/>- Evaluación <text:span text:style-name="Strong_20_Emphasis">inicial</text:span>: cuando se realiza al comienzo y consiste en la recogida de datos buscando encontrar la situación de partida <text:span text:style-name="T1">y los conocimientos previos del alumnado con la tarea 1 y valorando el criterio 3.1.b. Esta evaluación se corresponde con las actividad de motivación y activación.</text:span></text:p>
        </text:list-header>
      </text:list>
      <text:list text:style-name="L2">
        <text:list-header>
          <text:p text:style-name="P2"><text:bookmark text:name="yui_3_18_1_1_1780322751266_191"/>- Evaluación <text:span text:style-name="Strong_20_Emphasis">procesual</text:span>: cuando de manera continua y sistemática estamos recogiendo datos durante todo el tiempo que dure <text:span text:style-name="T1">l</text:span>a actividad, una unidad. Es fundamental para poder tomar decisiones de mejora en una evaluación formativa. <text:span text:style-name="T1">Aquí se valorarán las tareas 2,3,4 y 5 siendo valoradas con los criterios 1.1.b. y 2.3.b. Esta evaluación se corresponde con las actividades de exploración y estructuración)</text:span></text:p>
        </text:list-header>
      </text:list>
      <text:list text:style-name="L3">
        <text:list-header>
          <text:p text:style-name="P3"><text:bookmark text:name="yui_3_18_1_1_1780322751266_196"/>- Evaluación <text:span text:style-name="Strong_20_Emphasis">final</text:span>: consiste en la recogida y valoración de datos al finalizar <text:span text:style-name="T1">las 8 sesiones que dura la SdA</text:span> para <text:span text:style-name="T1">valorar </text:span>la realización <text:span text:style-name="T1">y adquisición </text:span>de<text:span text:style-name="T1">l</text:span> aprendizaje <text:span text:style-name="T1">siendo éstas las tareas 6, 7 y 8 valoradas con los criterios 3.1.b., 1.1.b y 2.3.b. y esta evaluación se corresponde con las actividades de aplicación y conclusión. </text:span></text:p>
        </text:list-header>
      </text:list>
      <text:p text:style-name="Standard"/>
      <text:p text:style-name="Standard">Para tratar <text:span text:style-name="T1">algunas de </text:span>las <text:span text:style-name="T2">posibles variables</text:span> que pudieran <text:span text:style-name="T1">darse voy a tener en cuenta</text:span>:</text:p>
      <text:p text:style-name="Standard"><text:tab/>- <text:span text:style-name="T2">Fallos técnicos</text:span>.</text:p>
      <text:p text:style-name="Standard"><text:tab/>Si la tecnología falla (falta de batería, aplicaciones que no cargan o errores de conexión), la</text:p>
      <text:p text:style-name="Standard"><text:tab/>estrategia consiste en mantener la calma y activar una alternativa analógica, como fichas en <text:tab/>papel o actividades orales.</text:p>
      <text:p text:style-name="Standard"><text:tab/>En este caso, los datos de evaluación no se pierden, sino que se trasladan al soporte <text:tab/>tradiciona<text:span text:style-name="T1">l</text:span>.</text:p>
      <text:p text:style-name="Standard"><text:tab/>- <text:span text:style-name="T3">Diferentes r</text:span><text:span text:style-name="T2">itmos de aprendizaje</text:span>.</text:p>
      <text:p text:style-name="Standard"><text:tab/>Puesto que hay tareas individuales, por parejas y en gran grupo, debo ajustar el apoyo según <text:tab/>el agrupamiento.</text:p>
      <text:p text:style-name="Standard"><text:tab/>Si un alumno tiene dificultades con el teclado en Canva, <text:span text:style-name="T1">por ejemplo, </text:span>se prioriza la <text:tab/>evaluación de la intencionalidad y el reconocimiento de la <text:span text:style-name="T1">tarea de manera oral aportándole <text:tab/>ayuda también entre iguales</text:span>.</text:p>
      <text:p text:style-name="Standard"><text:tab/>- <text:span text:style-name="T2">Dominio de la herramienta.</text:span></text:p>
      <text:p text:style-name="Standard"><text:tab/>Para minimizar errores de medición, debo asegurarme de dominar la aplicación previamente <text:tab/>y simplificar las herramientas al máximo antes de que el alumnado las utilic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6:11:40.946809447</meta:creation-date>
    <dc:date>2026-06-01T16:32:55.534479317</dc:date>
    <meta:editing-duration>PT20S</meta:editing-duration>
    <meta:editing-cycles>1</meta:editing-cycles>
    <meta:document-statistic meta:table-count="0" meta:image-count="0" meta:object-count="0" meta:page-count="1" meta:paragraph-count="15" meta:word-count="364" meta:character-count="2247" meta:non-whitespace-character-count="1885"/>
    <meta:generator>LibreOffice/7.4.7.2$Linux_X86_64 LibreOffice_project/40$Build-2</meta:generator>
  </office:meta>
</office:document-meta>
</file>