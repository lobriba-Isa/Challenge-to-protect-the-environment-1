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482" officeooo:paragraph-rsid="00172482"/>
    </style:style>
    <style:style style:name="P2" style:family="paragraph" style:parent-style-name="Standard">
      <style:text-properties officeooo:paragraph-rsid="00172482"/>
    </style:style>
    <style:style style:name="T1" style:family="text">
      <style:text-properties officeooo:rsid="0017248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4.1. Descripción del producto final.</text:p>
      <text:p text:style-name="P1"/>
      <text:p text:style-name="P2"><text:span text:style-name="T1"><text:s/></text:span>Hola compañeros.</text:p>
      <text:section text:style-name="Sect1" text:name="post-content-4864059">
        <text:p text:style-name="Text_20_body">La herramienta que voy a proponer a mi alumnado para elaborar el producto final (infografía para campaña de protección del medio ambiente) propuesto en este proyecto va a ser CANVA ya que considero que es una herramienta digital muy completa y fácil de usar. </text:p>
        <text:p text:style-name="Text_20_body">En primer lugar, es una herramienta que tiene fácil accesibilidad, es decir, solo es necesario crear una cuenta sencilla, con ayuda de sus padres, que luego puede seguir usando.</text:p>
        <text:p text:style-name="Text_20_body">Tiene una gran variedad de plantillas que le ayuda a tomar ideas y así crear su propia infografía personalizada. El alumnado de 3º de primaria todavía necesita modelos para la elaboración de trabajos. Contiene una gran variedad e dibujos para incluir.</text:p>
        <text:p text:style-name="Text_20_body">Pueden trabajar en equipo, ya que, pueden trabajar el línea y realizar la infografia varios en equipo, favoreciendo el trabajo colaborativo y cooperativo.</text:p>
        <text:p text:style-name="Text_20_body">Tiene un guardado automático lo que favorece la agilidad en el guardado del proyecto y evita la pérdida de trabajo realizado.</text:p>
        <text:p text:style-name="Text_20_body">Los proyectos pueden ser guardados de manera online y pueden ser compartidos para verlos a través de un enlace, así, protegemos el medio ambiente al no tener la necesidad de realizar una impresión en papel del trabajo realizado.</text:p>
        <text:p text:style-name="Text_20_body">Y, para finalizar, pero no menos importante, es una aplicación de fácil acceso en el centro educativo, con objetivos educativos y adaptado al contexto escolar.</text:p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7:38:48.838378101</meta:creation-date>
    <dc:date>2026-06-01T17:39:54.027631021</dc:date>
    <meta:editing-duration>PT1M5S</meta:editing-duration>
    <meta:editing-cycles>1</meta:editing-cycles>
    <meta:document-statistic meta:table-count="0" meta:image-count="0" meta:object-count="0" meta:page-count="1" meta:paragraph-count="9" meta:word-count="229" meta:character-count="1412" meta:non-whitespace-character-count="1190"/>
    <meta:generator>LibreOffice/7.4.7.2$Linux_X86_64 LibreOffice_project/40$Build-2</meta:generator>
  </office:meta>
</office:document-meta>
</file>